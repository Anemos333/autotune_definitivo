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7420" officeooo:paragraph-rsid="00147420"/>
    </style:style>
    <style:style style:name="P2" style:family="paragraph" style:parent-style-name="Standard">
      <style:paragraph-properties style:writing-mode="lr-tb" style:writing-mode-automatic="false"/>
      <style:text-properties officeooo:rsid="00147420" officeooo:paragraph-rsid="00147420"/>
    </style:style>
    <style:style style:name="P3" style:family="paragraph" style:parent-style-name="Standard">
      <style:text-properties officeooo:rsid="00163157" officeooo:paragraph-rsid="00163157"/>
    </style:style>
    <style:style style:name="P4" style:family="paragraph" style:parent-style-name="Standard">
      <style:text-properties officeooo:rsid="0017c7a3" officeooo:paragraph-rsid="0017c7a3"/>
    </style:style>
    <style:style style:name="P5" style:family="paragraph" style:parent-style-name="Standard">
      <style:text-properties officeooo:rsid="0017c7a3" officeooo:paragraph-rsid="0018942d"/>
    </style:style>
    <style:style style:name="P6" style:family="paragraph" style:parent-style-name="Standard">
      <style:text-properties officeooo:rsid="0018942d" officeooo:paragraph-rsid="0018942d"/>
    </style:style>
    <style:style style:name="P7" style:family="paragraph" style:parent-style-name="Standard">
      <style:text-properties officeooo:rsid="001a55f0" officeooo:paragraph-rsid="001a55f0"/>
    </style:style>
    <style:style style:name="T1" style:family="text">
      <style:text-properties officeooo:rsid="00163157"/>
    </style:style>
    <style:style style:name="T2" style:family="text">
      <style:text-properties officeooo:rsid="001b47f0"/>
    </style:style>
    <style:style style:name="T3" style:family="text">
      <style:text-properties officeooo:rsid="001894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IETTIVO:</text:p>
      <text:p text:style-name="P1">Creami un plugin .vst3 <text:span text:style-name="T1">professionale</text:span> funzionante su daw moderne come Ableton Live e Fender Studio pro di autotune in grado di lavorare anche su scale microtonali.</text:p>
      <text:p text:style-name="P1">Questo plugin deve:</text:p>
      <text:p text:style-name="P2">-Analizzare il segnale in ingresso tramite autocorrelazione YIN</text:p>
      <text:p text:style-name="P1">-in base alla scala selezionata individuare la nota più vicina</text:p>
      <text:p text:style-name="P1">-correggere l’intonazione mantenendo la latenza praticamente a zero</text:p>
      <text:p text:style-name="P1">L’utente inoltre deve poter:</text:p>
      <text:p text:style-name="P1">-scegliere la scala tra:</text:p>
      <text:p text:style-name="P1"><text:s text:c="2"/>- tutte le scale facenti parte del temperamento equabile</text:p>
      <text:p text:style-name="P1"><text:s text:c="2"/>-la scala <text:s/>24 EDO</text:p>
      <text:p text:style-name="P1"><text:s text:c="2"/>-le scale bizantine</text:p>
      <text:p text:style-name="P1"><text:s text:c="2"/>-la scala 19 EDO</text:p>
      <text:p text:style-name="P1"><text:s text:c="2"/>-la scala 31 EDO</text:p>
      <text:p text:style-name="P1"><text:s text:c="2"/>-la scala pitagorica</text:p>
      <text:p text:style-name="P1"><text:s text:c="2"/>-la scala tolemaica</text:p>
      <text:p text:style-name="P1"><text:s text:c="2"/>-i maquam arabi</text:p>
      <text:p text:style-name="P1"><text:s text:c="2"/>-i sistemi slendro e pelog</text:p>
      <text:p text:style-name="P1">-<text:span text:style-name="T1">scegliere la velocità di intervento della correzione espressa in ms e l’amount dell’effetto</text:span></text:p>
      <text:p text:style-name="P3">L’utente può inoltre creare fino a 7 preset di scala personalizzati. Deve poter dividere l’ottava, graficamente rappresentata come un segmento, in un numero di intervalli compreso tra 3 <text:s/>e 33, non necessariamente uguali. L’utente può salvare i preset ed eliminarli. Non possono esistere più di 7 preset di scala contemporaneamente.</text:p>
      <text:p text:style-name="P3">Il plugin deve salvare lo stato del lavoro ogni volta che l’utente salva il progetto principale nella daw e al momento della chiusura del progetto stesso. E’ molto importante gestire correttamente il salvataggio.</text:p>
      <text:p text:style-name="P3"/>
      <text:p text:style-name="P4">RISULTATO FINALE ATTESO:</text:p>
      <text:p text:style-name="P4">Un vst3 moderno, professionale e funzionante</text:p>
      <text:p text:style-name="P4">-scritto in c++ e juce, juce è installato al percorso C:\Users\gugli\OneDrive\Desktop\JUCE</text:p>
      <text:p text:style-name="P4">-estensione esclusivamente <text:s/>.vst3</text:p>
      <text:p text:style-name="P4">-che giri senza errori</text:p>
      <text:p text:style-name="P4">-che occupi poca memoria (massimo 5.000 Kb)</text:p>
      <text:p text:style-name="P4">-ottimizzato per lavorare a latenza zero</text:p>
      <text:p text:style-name="P4">-che implementi tutte le istruzioni del paragrafo OBBIETTIVO e nulla di più, se hai dubbi fammi domande, non inventare soluzioni senza richiesta esplicita o non scritte nel prompt o nella documentazione</text:p>
      <text:p text:style-name="P4"/>
      <text:p text:style-name="P4">CONTESTO:</text:p>
      <text:p text:style-name="P4">-juce 8.0.12, audio plugin basic</text:p>
      <text:p text:style-name="P4">-C++17</text:p>
      <text:p text:style-name="P4"/>
      <text:p text:style-name="P4">testing:</text:p>
      <text:p text:style-name="P4">-testing di base sulla correttezza e la consistenza del codice</text:p>
      <text:p text:style-name="P4"/>
      <text:p text:style-name="P4">INTERFACCIA GRAFICA:</text:p>
      <text:p text:style-name="P4">-Sullo sfondo deve mostrare la foto al seguente percorso: C:\Users\gugli\Downloads<text:span text:style-name="T2">\sfondo1.jpeg</text:span></text:p>
      <text:p text:style-name="P4">-Dimensione interfaccia regolabile dall’utente</text:p>
      <text:p text:style-name="P5">-i due pomelli per la velocità di azione in ms e per l’amount dell’effetto <text:span text:style-name="T3">devono essere al centro della gui in verticale e rispettivamente ad ¼ e ¾ della gui in orizzontale</text:span></text:p>
      <text:p text:style-name="P5">-<text:span text:style-name="T3">ci devono essere label precise che indichino le funzionalità di ogni componente</text:span></text:p>
      <text:p text:style-name="P5"/>
      <text:p text:style-name="P4"><text:soft-page-break/>-Le scale vengono selezionate da un menù a tendina posto in alto al centro, lasciando 2 mm vuoti di spazio in alto</text:p>
      <text:p text:style-name="P4">-<text:span text:style-name="T3">infondo al menù a tendina ci deve essere la voce “le tue scale” che apre un sottomenù con i preset dell’utente. Se non ci sono preset compare un pulsante crea scala che porta alla pagina di creazione della scala, altrimenti mostra i preset. Se i preset sono strettamente minori di 7 infondo compare ancora “crea scala”, che al raggiungimento di 7 preset scompare rendendo impossibile crearne altre.</text:span></text:p>
      <text:p text:style-name="P4">-<text:span text:style-name="T3">la pagina crea scala è separata dal resto del programma e accessibile solo da “crea scala” bel menù a tendina del punto precedente</text:span></text:p>
      <text:p text:style-name="P4">-<text:span text:style-name="T3">ha come sfondo l’immagine al seguente percorso: C:\Users\gugli\Downloads</text:span><text:span text:style-name="T2">\sfondo2.jpg</text:span></text:p>
      <text:p text:style-name="P4">-<text:span text:style-name="T3">l’ottava è rappresentata come un rettangolo. La base del rettangolo rappresenta la divisione dell’ottava, è importante ricordare che le frequenze sono in scala logaritmica e le divisioni devono lavorare tenendone conto</text:span></text:p>
      <text:p text:style-name="P4">-<text:span text:style-name="T3">si creano gli intervalli cliccando sul mouse in un punto del rettangolo</text:span></text:p>
      <text:p text:style-name="P6">-fino a 3 intervalli non si può salvare la scala, raggiunto il 33esimo non se ne possono creare ulteriori</text:p>
      <text:p text:style-name="P6">-sotto il rettangolo c’è un box per inserire il nome della scala e un pulsante salva</text:p>
      <text:p text:style-name="P6">-anche qui inserisci label chiare per ogni comando</text:p>
      <text:p text:style-name="P7">ULTERIORI INDICAZIONI:</text:p>
      <text:p text:style-name="P7">-se hai dubbi chiedimi</text:p>
      <text:p text:style-name="P7">-rispetta tutte e sole queste indicazioni</text:p>
      <text:p text:style-name="P7">-<text:span text:style-name="T2">gestione dei bug sensata</text:span></text:p>
      <text:p text:style-name="P7">-<text:span text:style-name="T2">è una versione test, non ancora una release finale, importa solo che funzioni correttamente</text:span></text:p>
      <text:p text:style-name="P7">-<text:span text:style-name="T2">considero la task conclusa quando sarà implementato tutto quello che ho scritto nel prompt e ne sarà testato il funzionamento</text:span></text:p>
      <text:p text:style-name="P7">… e buon lavoro!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1T14:07:31.983609700</meta:creation-date>
    <dc:date>2026-06-01T15:02:50.514405800</dc:date>
    <meta:editing-duration>PT30M15S</meta:editing-duration>
    <meta:editing-cycles>4</meta:editing-cycles>
    <meta:generator>LibreOffice/26.2.1.2$Windows_X86_64 LibreOffice_project/620$Build-2</meta:generator>
    <meta:document-statistic meta:table-count="0" meta:image-count="0" meta:object-count="0" meta:page-count="2" meta:paragraph-count="54" meta:word-count="607" meta:character-count="3924" meta:non-whitespace-character-count="3350"/>
  </office:meta>
</office:document-meta>
</file>